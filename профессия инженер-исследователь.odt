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B0D5A232.jpg" manifest:media-type="image/jpeg"/>
  <manifest:file-entry manifest:full-path="Pictures/100000000000027000000374514EDEF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officeooo:rsid="001432e9" officeooo:paragraph-rsid="001432e9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fo:font-size="16pt" officeooo:rsid="001432e9" officeooo:paragraph-rsid="001432e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432e9" officeooo:paragraph-rsid="001432e9" style:font-size-asian="16pt" style:font-size-complex="16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Заголовок_20_1_20_без_20_номера">
      <style:paragraph-properties fo:break-before="page"/>
    </style:style>
    <style:style style:name="P7" style:family="paragraph" style:parent-style-name="Абзац_20_рисунка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0060115"/>
    </style:style>
    <style:style style:name="P12" style:family="paragraph" style:parent-style-name="Text_20_body">
      <style:text-properties officeooo:paragraph-rsid="00085b0e"/>
    </style:style>
    <style:style style:name="P13" style:family="paragraph" style:parent-style-name="Text_20_body">
      <style:text-properties officeooo:paragraph-rsid="00092881"/>
    </style:style>
    <style:style style:name="P14" style:family="paragraph" style:parent-style-name="Text_20_body">
      <style:text-properties officeooo:paragraph-rsid="000afb84"/>
    </style:style>
    <style:style style:name="P15" style:family="paragraph" style:parent-style-name="Text_20_body">
      <style:text-properties officeooo:rsid="00109f4f" officeooo:paragraph-rsid="00117bd3"/>
    </style:style>
    <style:style style:name="P16" style:family="paragraph" style:parent-style-name="Text_20_body">
      <style:paragraph-properties fo:margin-left="0cm" fo:text-indent="0cm" style:auto-text-indent="false"/>
      <style:text-properties officeooo:rsid="00109f4f" officeooo:paragraph-rsid="00117bd3"/>
    </style:style>
    <style:style style:name="P17" style:family="paragraph" style:parent-style-name="Text_20_body">
      <style:text-properties officeooo:rsid="00109f4f" officeooo:paragraph-rsid="00109f4f"/>
    </style:style>
    <style:style style:name="P18" style:family="paragraph" style:parent-style-name="Drawing">
      <style:text-properties officeooo:paragraph-rsid="001236fa"/>
    </style:style>
    <style:style style:name="P19" style:family="paragraph" style:parent-style-name="Заголовок_20_1_20_без_20_номера">
      <style:paragraph-properties fo:break-before="page"/>
      <style:text-properties officeooo:paragraph-rsid="0014790a"/>
    </style:style>
    <style:style style:name="P20" style:family="paragraph" style:parent-style-name="Text_20_body">
      <style:text-properties officeooo:paragraph-rsid="0014790a"/>
    </style:style>
    <style:style style:name="P2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 style:master-page-name="First_20_Page">
      <style:paragraph-properties fo:text-align="center" style:justify-single-word="false" style:page-number="auto"/>
    </style:style>
    <style:style style:name="P26" style:family="paragraph" style:parent-style-name="Standard">
      <style:paragraph-properties fo:text-align="end" style:justify-single-word="false"/>
      <style:text-properties fo:font-size="16pt" officeooo:rsid="00186623" officeooo:paragraph-rsid="00186623" style:font-size-asian="16pt" style:font-size-complex="16pt"/>
    </style:style>
    <style:style style:name="P27" style:family="paragraph" style:parent-style-name="Heading_20_1">
      <style:paragraph-properties fo:margin-top="0cm" fo:margin-bottom="0cm" style:contextual-spacing="false"/>
    </style:style>
    <style:style style:name="P28" style:family="paragraph" style:parent-style-name="Heading_20_2">
      <style:paragraph-properties fo:margin-top="0cm" fo:margin-bottom="0cm" style:contextual-spacing="false"/>
    </style:style>
    <style:style style:name="T1" style:family="text">
      <style:text-properties officeooo:rsid="000b6a65"/>
    </style:style>
    <style:style style:name="T2" style:family="text">
      <style:text-properties officeooo:rsid="00117bd3"/>
    </style:style>
    <style:style style:name="T3" style:family="text">
      <style:text-properties officeooo:rsid="0018662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ОСКОВСКИЙ ФИЗИКО-ТЕХНИЧЕСКИЙ ИНСТИТУТ 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ример текстового документа</text:p>
      <text:p text:style-name="P2"/>
      <text:p text:style-name="P2"/>
      <text:p text:style-name="P2"/>
      <text:p text:style-name="P2"/>
      <text:p text:style-name="P3">Выполнил<text:span text:style-name="T3">а</text:span>:</text:p>
      <text:p text:style-name="P26">Стукалова Наталья</text:p>
      <text:p text:style-name="P3"/>
      <text:p text:style-name="P3"/>
      <text:p text:style-name="P3"/>
      <text:p text:style-name="P3"/>
      <text:p text:style-name="P3"/>
      <text:p text:style-name="P3"/>
      <text:p text:style-name="P4">Долгопрудный, 202<text:span text:style-name="T3">6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8"><text:a xlink:type="simple" xlink:href="#__RefHeading___Toc406_3685690487" office:name="ВВЕДЕНИЕ" text:style-name="Index_20_Link" text:visited-style-name="Index_20_Link">ВВЕДЕНИЕ<text:tab/>3</text:a></text:p>
          <text:p text:style-name="P8"><text:a xlink:type="simple" xlink:href="#__RefHeading___Toc17_3685690487" office:name="Основные направления деятельности" text:style-name="Index_20_Link" text:visited-style-name="Index_20_Link">1 Основные направления деятельности<text:tab/>3</text:a></text:p>
          <text:p text:style-name="P9"><text:a xlink:type="simple" xlink:href="#__RefHeading___Toc19_3685690487" office:name="Экспериментальные исследования" text:style-name="Index_20_Link" text:visited-style-name="Index_20_Link">1.1 Экспериментальные исследования<text:tab/>3</text:a></text:p>
          <text:p text:style-name="P10"><text:a xlink:type="simple" xlink:href="#__RefHeading___Toc21_3685690487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10"><text:a xlink:type="simple" xlink:href="#__RefHeading___Toc23_3685690487" office:name="Сбор данных" text:style-name="Index_20_Link" text:visited-style-name="Index_20_Link">1.1.2 Сбор данных<text:tab/>3</text:a></text:p>
          <text:p text:style-name="P9"><text:a xlink:type="simple" xlink:href="#__RefHeading___Toc25_3685690487" office:name="Анализ данных" text:style-name="Index_20_Link" text:visited-style-name="Index_20_Link">1.2 Анализ данных<text:tab/>3</text:a></text:p>
          <text:p text:style-name="P10"><text:a xlink:type="simple" xlink:href="#__RefHeading___Toc27_3685690487" office:name="Обработка и интерпретация полученных данных" text:style-name="Index_20_Link" text:visited-style-name="Index_20_Link">1.2.1 Обработка и интерпретация полученных данных<text:tab/>3</text:a></text:p>
          <text:p text:style-name="P10"><text:a xlink:type="simple" xlink:href="#__RefHeading___Toc29_3685690487" office:name="Применение методов моделирования и симуляции" text:style-name="Index_20_Link" text:visited-style-name="Index_20_Link">1.2.2 Применение методов моделирования и симуляции<text:tab/>3</text:a></text:p>
          <text:p text:style-name="P9"><text:a xlink:type="simple" xlink:href="#__RefHeading___Toc31_3685690487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10"><text:a xlink:type="simple" xlink:href="#__RefHeading___Toc33_3685690487" office:name="Создание прототипов" text:style-name="Index_20_Link" text:visited-style-name="Index_20_Link">1.3.1 Создание прототипов<text:tab/>4</text:a></text:p>
          <text:p text:style-name="P10"><text:a xlink:type="simple" xlink:href="#__RefHeading___Toc35_3685690487" office:name="Тестирование прототипов" text:style-name="Index_20_Link" text:visited-style-name="Index_20_Link">1.3.2 Тестирование прототипов<text:tab/>4</text:a></text:p>
          <text:p text:style-name="P10"><text:a xlink:type="simple" xlink:href="#__RefHeading___Toc37_3685690487" office:name="Подготовка отчётов и презентаций" text:style-name="Index_20_Link" text:visited-style-name="Index_20_Link">1.3.3 Подготовка отчётов и презентаций<text:tab/>4</text:a></text:p>
          <text:p text:style-name="P10"><text:a xlink:type="simple" xlink:href="#__RefHeading___Toc39_3685690487" office:name="Оформление результатов исследований" text:style-name="Index_20_Link" text:visited-style-name="Index_20_Link">1.3.4 Оформление результатов исследований<text:tab/>4</text:a></text:p>
          <text:p text:style-name="P10"><text:a xlink:type="simple" xlink:href="#__RefHeading___Toc41_3685690487" office:name="Публикация результатов" text:style-name="Index_20_Link" text:visited-style-name="Index_20_Link">1.3.5 Публикация результатов<text:tab/>4</text:a></text:p>
          <text:p text:style-name="P9"><text:a xlink:type="simple" xlink:href="#__RefHeading___Toc43_3685690487" office:name="Сотрудничество" text:style-name="Index_20_Link" text:visited-style-name="Index_20_Link">1.4 Сотрудничество<text:tab/>4</text:a></text:p>
          <text:p text:style-name="P10"><text:a xlink:type="simple" xlink:href="#__RefHeading___Toc45_3685690487" office:name="Работа в команде" text:style-name="Index_20_Link" text:visited-style-name="Index_20_Link">1.4.1 Работа в команде<text:tab/>4</text:a></text:p>
          <text:p text:style-name="P10"><text:a xlink:type="simple" xlink:href="#__RefHeading___Toc47_3685690487" office:name="Участие в междисциплинарных проектах" text:style-name="Index_20_Link" text:visited-style-name="Index_20_Link">1.4.2 Участие в междисциплинарных проектах<text:tab/>4</text:a></text:p>
          <text:p text:style-name="P8"><text:a xlink:type="simple" xlink:href="#__RefHeading___Toc172_3685690487" office:name="Ключевые компетенции специалиста" text:style-name="Index_20_Link" text:visited-style-name="Index_20_Link">2 Ключевые компетенции специалиста<text:tab/>5</text:a></text:p>
          <text:p text:style-name="P9"><text:a xlink:type="simple" xlink:href="#__RefHeading___Toc174_3685690487" office:name="Технические навыки" text:style-name="Index_20_Link" text:visited-style-name="Index_20_Link">2.1 Технические навыки<text:tab/>5</text:a></text:p>
          <text:p text:style-name="P9"><text:a xlink:type="simple" xlink:href="#__RefHeading___Toc176_3685690487" office:name="Личностные качества" text:style-name="Index_20_Link" text:visited-style-name="Index_20_Link">2.2 Личностные качества<text:tab/>5</text:a></text:p>
          <text:p text:style-name="P8"><text:a xlink:type="simple" xlink:href="#__RefHeading___Toc178_3685690487" office:name="Сферы применения" text:style-name="Index_20_Link" text:visited-style-name="Index_20_Link">3 Сферы применения<text:tab/>5</text:a></text:p>
          <text:p text:style-name="P9"><text:a xlink:type="simple" xlink:href="#__RefHeading___Toc180_3685690487" office:name="Роль в современном бизнесе" text:style-name="Index_20_Link" text:visited-style-name="Index_20_Link">3.1 Роль в современном бизнесе<text:tab/>5</text:a></text:p>
          <text:p text:style-name="P9"><text:a xlink:type="simple" xlink:href="#__RefHeading___Toc182_3685690487" office:name="Перспективы развития" text:style-name="Index_20_Link" text:visited-style-name="Index_20_Link">3.2 Перспективы развития<text:tab/>6</text:a></text:p>
          <text:p text:style-name="P8"><text:a xlink:type="simple" xlink:href="#__RefHeading___Toc184_3685690487" office:name="Требования к образованию" text:style-name="Index_20_Link" text:visited-style-name="Index_20_Link">4 Требования к образованию<text:tab/>6</text:a></text:p>
          <text:p text:style-name="P8"><text:a xlink:type="simple" xlink:href="#__RefHeading___Toc186_3685690487" office:name="ЗАКЛЮЧЕНИЕ" text:style-name="Index_20_Link" text:visited-style-name="Index_20_Link">ЗАКЛЮЧЕНИЕ<text:tab/>6</text:a></text:p>
        </text:index-body>
      </text:table-of-content>
      <text:p text:style-name="P11"/>
      <text:h text:style-name="P6" text:outline-level="1"><text:bookmark-start text:name="__RefHeading___Toc406_3685690487"/>В<text:span text:style-name="T1">ВЕДЕНИЕ</text:span><text:bookmark-end text:name="__RefHeading___Toc406_3685690487"/></text:h>
      <text:p text:style-name="P11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7_3685690487"/>Основные направления деятельности<text:bookmark-end text:name="__RefHeading___Toc17_3685690487"/></text:h>
      <text:p text:style-name="P12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P28" text:outline-level="2"><text:bookmark-start text:name="__RefHeading___Toc19_3685690487"/>Экспериментальные исследования<text:bookmark-end text:name="__RefHeading___Toc19_3685690487"/></text:h>
      <text:h text:style-name="Heading_20_3" text:outline-level="3"><text:bookmark-start text:name="__RefHeading___Toc21_3685690487"/>Разработка и проведение экспериментов<text:bookmark-end text:name="__RefHeading___Toc21_3685690487"/></text:h>
      <text:p text:style-name="P12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3_3685690487"/>Сбор данных<text:bookmark-end text:name="__RefHeading___Toc23_3685690487"/></text:h>
      <text:p text:style-name="P12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P28" text:outline-level="2"><text:bookmark-start text:name="__RefHeading___Toc25_3685690487"/>Анализ данных<text:bookmark-end text:name="__RefHeading___Toc25_3685690487"/></text:h>
      <text:h text:style-name="Heading_20_3" text:outline-level="3"><text:bookmark-start text:name="__RefHeading___Toc27_3685690487"/>Обработка и интерпретация полученных данных<text:bookmark-end text:name="__RefHeading___Toc27_3685690487"/></text:h>
      <text:p text:style-name="P13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9_3685690487"/>Применение методов моделирования и симуляции<text:bookmark-end text:name="__RefHeading___Toc29_3685690487"/></text:h>
      <text:p text:style-name="P13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P28" text:outline-level="2"><text:bookmark-start text:name="__RefHeading___Toc31_3685690487"/>Разработка и тестирование прототипов<text:bookmark-end text:name="__RefHeading___Toc31_3685690487"/></text:h>
      <text:h text:style-name="Heading_20_3" text:outline-level="3"><text:bookmark-start text:name="__RefHeading___Toc33_3685690487"/>Создание прототипов<text:bookmark-end text:name="__RefHeading___Toc33_3685690487"/></text:h>
      <text:p text:style-name="P13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5_3685690487"/>Тестирование прототипов<text:bookmark-end text:name="__RefHeading___Toc35_3685690487"/></text:h>
      <text:p text:style-name="P13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7_3685690487"/>Подготовка отчётов и презентаций<text:bookmark-end text:name="__RefHeading___Toc37_3685690487"/></text:h>
      <text:h text:style-name="Heading_20_3" text:outline-level="3"><text:bookmark-start text:name="__RefHeading___Toc39_3685690487"/>Оформление результатов исследований<text:bookmark-end text:name="__RefHeading___Toc39_3685690487"/></text:h>
      <text:p text:style-name="P13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1_3685690487"/>Публикация результатов<text:bookmark-end text:name="__RefHeading___Toc41_3685690487"/></text:h>
      <text:p text:style-name="P13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P28" text:outline-level="2"><text:bookmark-start text:name="__RefHeading___Toc43_3685690487"/>Сотрудничество<text:bookmark-end text:name="__RefHeading___Toc43_3685690487"/></text:h>
      <text:h text:style-name="Heading_20_3" text:outline-level="3"><text:bookmark-start text:name="__RefHeading___Toc45_3685690487"/>Работа в команде<text:bookmark-end text:name="__RefHeading___Toc45_3685690487"/></text:h>
      <text:p text:style-name="P13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7_3685690487"/>Участие в междисциплинарных проектах<text:bookmark-end text:name="__RefHeading___Toc47_3685690487"/></text:h>
      <text:p text:style-name="P14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27" text:outline-level="1"><text:bookmark-start text:name="__RefHeading___Toc172_3685690487"/>Ключевые компетенции специалиста<text:bookmark-end text:name="__RefHeading___Toc172_3685690487"/></text:h>
      <text:h text:style-name="Heading_20_2" text:outline-level="2"><text:bookmark-start text:name="__RefHeading___Toc174_3685690487"/>Технические навыки<text:bookmark-end text:name="__RefHeading___Toc174_3685690487"/></text:h>
      <text:p text:style-name="P14">- Глубокие знания в профильной области</text:p>
      <text:p text:style-name="P14">- Умение работать с современным оборудованием</text:p>
      <text:p text:style-name="P14">- Навыки программирования</text:p>
      <text:p text:style-name="P14">- Способность к математическому моделированию</text:p>
      <text:h text:style-name="Heading_20_2" text:outline-level="2"><text:bookmark-start text:name="__RefHeading___Toc176_3685690487"/>Личностные качества<text:bookmark-end text:name="__RefHeading___Toc176_3685690487"/></text:h>
      <text:p text:style-name="P14">- Аналитическое мышление</text:p>
      <text:p text:style-name="P14">- Способность к критическому анализу</text:p>
      <text:p text:style-name="P14">- Гибкость мышления</text:p>
      <text:p text:style-name="P14">- Коммуникабельность</text:p>
      <text:p text:style-name="P14">- Стремление к постоянному обучению</text:p>
      <text:h text:style-name="Heading_20_2" text:outline-level="2">Профессионализм</text:h>
      <text:p text:style-name="P15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3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/text:p>
      <text:p text:style-name="P16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7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178_3685690487"/>Сферы применения<text:bookmark-end text:name="__RefHeading___Toc178_3685690487"/></text:h>
      <text:p text:style-name="P14">Инженеры-исследователи востребованы в:</text:p>
      <text:p text:style-name="P14">- Машиностроении</text:p>
      <text:p text:style-name="P14">- Электронике</text:p>
      <text:p text:style-name="P14">- Энергетике</text:p>
      <text:p text:style-name="P14">- Биотехнологиях</text:p>
      <text:p text:style-name="P14">- IT-индустрии</text:p>
      <text:p text:style-name="P14">- Химической промышленности</text:p>
      <text:h text:style-name="Heading_20_2" text:outline-level="2"><text:bookmark-start text:name="__RefHeading___Toc180_3685690487"/>Роль в современном бизнесе<text:bookmark-end text:name="__RefHeading___Toc180_3685690487"/></text:h>
      <text:p text:style-name="P14">Преимущества для компании:</text:p>
      <text:p text:style-name="P14">- Внедрение передовых технологий</text:p>
      <text:p text:style-name="P14">- Оптимизация производственных процессов</text:p>
      <text:p text:style-name="P14">- Разработка инновационных продуктов</text:p>
      <text:p text:style-name="P14">- Снижение затрат</text:p>
      <text:p text:style-name="P14">- Повышение конкурентоспособности</text:p>
      <text:h text:style-name="Heading_20_2" text:outline-level="2"><text:bookmark-start text:name="__RefHeading___Toc182_3685690487"/>Перспективы развития<text:bookmark-end text:name="__RefHeading___Toc182_3685690487"/></text:h>
      <text:p text:style-name="P14">Карьерный рост инженера-исследователя может включать:</text:p>
      <text:p text:style-name="P14">- Руководящие позиции в отделах исследований и разработок</text:p>
      <text:p text:style-name="P14">- Создание собственных исследовательских проектов</text:p>
      <text:p text:style-name="P14">- Переход в академическую сферу</text:p>
      <text:p text:style-name="P14">- Основание инновационных компаний</text:p>
      <text:h text:style-name="Heading_20_1" text:outline-level="1"><text:bookmark-start text:name="__RefHeading___Toc184_3685690487"/>Требования к образованию<text:bookmark-end text:name="__RefHeading___Toc184_3685690487"/></text:h>
      <text:p text:style-name="P14">Для работы инженером-исследователем необходимо:</text:p>
      <text:p text:style-name="P14">- Высшее техническое образование</text:p>
      <text:p text:style-name="P14">- Магистратура или аспирантура</text:p>
      <text:p text:style-name="P14">- Практический опыт в выбранной области</text:p>
      <text:p text:style-name="P14">- Знание современных методов исследования</text:p>
      <text:p text:style-name="P14">- Владение специализированным программным обеспечением</text:p>
      <text:h text:style-name="Heading_20_1" text:outline-level="1">Примеры из жизни</text:h>
      <text:h text:style-name="Heading_20_2" text:outline-level="2">Организации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Абзац_20_рисунка"><draw:frame draw:style-name="fr2" draw:name="Изображение2" text:anchor-type="as-char" svg:width="17cm" svg:height="9.562cm" draw:z-index="2"><draw:image xlink:href="Pictures/100000000000064000000384B0D5A232.jpg" xlink:type="simple" xlink:show="embed" xlink:actuate="onLoad" draw:mime-type="image/jpeg"/></draw:frame></text:p>
      <text:p text:style-name="P18">Рисунок <text:sequence text:ref-name="refDrawing0" text:name="Drawing" text:formula="ooow:Drawing+1" style:num-format="1">1</text:sequence><text:s/>— Лабораторный корпус МФТИ, Физтех</text:p>
      <text:h text:style-name="Heading_20_2" text:outline-level="2">Люди</text:h>
      <text:p text:style-name="Text_20_body">На рисунке <text:sequence-ref text:reference-format="value" text:ref-name="refDrawing1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text:soft-page-break/><draw:frame draw:style-name="fr1" draw:name="Изображение1" text:anchor-type="as-char" svg:width="10.22cm" svg:height="15.333cm" draw:z-index="0"><draw:image xlink:href="Pictures/100000000000027000000374514EDEF6.png" xlink:type="simple" xlink:show="embed" xlink:actuate="onLoad" draw:mime-type="image/png"/></draw:frame></text:p>
      <text:p text:style-name="Drawing">Рисунок <text:sequence text:ref-name="refDrawing1" text:name="Drawing" text:formula="ooow:Drawing+1" style:num-format="1">2</text:sequence><text:s/>— <text:span text:style-name="T3">Неизвестно кто</text:span>,<text:line-break/>выпускник лицея № <text:span text:style-name="T3">хз</text:span><text:line-break/>и студент <text:span text:style-name="T3">первого</text:span> курса МФТИ, Физтех</text:p>
      <text:h text:style-name="P19" text:outline-level="1"><text:bookmark-start text:name="__RefHeading___Toc186_3685690487"/>З<text:span text:style-name="T1">АКЛЮЧЕНИЕ</text:span><text:bookmark-end text:name="__RefHeading___Toc186_3685690487"/></text:h>
      <text:p text:style-name="P20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7">Таблица <text:sequence text:ref-name="refTable0" text:name="Table" text:formula="ooow:Table+1" style:num-format="1">1</text:sequence><text:s/>— ключевые компетенции специалиста</text:p>
      <table:table table:name="Таблица1" table:style-name="Таблица1" table:template-name="Default Style">
        <table:table-column table:style-name="Таблица1.A"/>
        <table:table-column table:style-name="Таблица1.B" table:number-columns-repeated="3"/>
        <table:table-row table:style-name="Таблица1.1">
          <table:table-cell table:style-name="Таблица1.A1" office:value-type="string">
            <text:p text:style-name="P21">Softskills</text:p>
          </table:table-cell>
          <table:table-cell table:style-name="Таблица1.A1" office:value-type="string">
            <text:p text:style-name="P23">адаптивность</text:p>
          </table:table-cell>
          <table:table-cell table:style-name="Таблица1.A1" office:value-type="string">
            <text:p text:style-name="P23">коммуникация</text:p>
          </table:table-cell>
          <table:table-cell table:style-name="Таблица1.D1" office:value-type="string">
            <text:p text:style-name="P23">Нахождение нестандартных решений</text:p>
          </table:table-cell>
        </table:table-row>
        <table:table-row table:style-name="Таблица1.1">
          <table:table-cell table:style-name="Таблица1.A2" office:value-type="string">
            <text:p text:style-name="P22">Hardskills</text:p>
          </table:table-cell>
          <table:table-cell table:style-name="Таблица1.A2" office:value-type="string">
            <text:p text:style-name="P24">Моделирование процессов</text:p>
          </table:table-cell>
          <table:table-cell table:style-name="Таблица1.A2" office:value-type="string">
            <text:p text:style-name="P24">Программирование и автоматизация</text:p>
          </table:table-cell>
          <table:table-cell table:style-name="Таблица1.D2" office:value-type="string">
            <text:p text:style-name="P24">Документация и отчетность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17:39:32.112755800</meta:creation-date>
    <dc:date>2026-05-18T00:35:41.855000000</dc:date>
    <meta:editing-duration>PT2H32M55S</meta:editing-duration>
    <meta:editing-cycles>16</meta:editing-cycles>
    <meta:generator>LibreOffice/7.6.7.2$Windows_X86_64 LibreOffice_project/dd47e4b30cb7dab30588d6c79c651f218165e3c5</meta:generator>
    <meta:document-statistic meta:table-count="1" meta:image-count="2" meta:object-count="1" meta:page-count="12" meta:paragraph-count="126" meta:word-count="874" meta:character-count="6960" meta:non-whitespace-character-count="6228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